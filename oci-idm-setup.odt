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80000049AAB21694C.png" manifest:media-type="image/png"/>
  <manifest:file-entry manifest:full-path="Pictures/10000001000005C80000049A72BF6760.png" manifest:media-type="image/png"/>
  <manifest:file-entry manifest:full-path="Pictures/10000001000005B00000046DE94FD268.png" manifest:media-type="image/png"/>
  <manifest:file-entry manifest:full-path="Pictures/100000010000044F000003447375EAE6.png" manifest:media-type="image/png"/>
  <manifest:file-entry manifest:full-path="Pictures/100000010000044A0000012FA7794B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edb" officeooo:paragraph-rsid="0011aedb"/>
    </style:style>
    <style:style style:name="P2" style:family="paragraph" style:parent-style-name="Standard">
      <style:text-properties officeooo:rsid="0016c94a" officeooo:paragraph-rsid="0016c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s OCI j’ai créé 2 entrées pour que l’authentication fonction :</text:p>
      <text:p text:style-name="P1"/>
      <text:p text:style-name="P1">(rappel : pour tester : --noauth et aussi –ui-debug)</text:p>
      <text:p text:style-name="P1"/>
      <text:p text:style-name="P2">Il y a une entrée pour le dev (callback for localhost) et un pour la prod (callback vers oci-companion.osc-cloud.com)</text:p>
      <text:p text:style-name="P1"/>
      <text:p text:style-name="P1"><draw:frame draw:style-name="fr1" draw:name="Image1" text:anchor-type="char" svg:x="0in" svg:y="0.0591in" svg:width="6.9252in" svg:height="1.9102in" draw:z-index="0"><draw:image xlink:href="Pictures/100000010000044A0000012FA7794B94.png" xlink:type="simple" xlink:show="embed" xlink:actuate="onLoad" draw:mime-type="image/png"/></draw:frame><draw:frame draw:style-name="fr1" draw:name="Image2" text:anchor-type="char" svg:x="0.0346in" svg:y="2.1075in" svg:width="3.9299in" svg:height="2.9783in" draw:z-index="1"><draw:image xlink:href="Pictures/100000010000044F000003447375EA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0744in" svg:y="2.1929in" svg:width="3.8429in" svg:height="3.0591in" draw:z-index="2"><draw:image xlink:href="Pictures/10000001000005C80000049A72BF6760.png" xlink:type="simple" xlink:show="embed" xlink:actuate="onLoad" draw:mime-type="image/png"/></draw:frame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x="-0.0083in" svg:y="0.0165in" svg:width="4.0252in" svg:height="3.2035in" draw:z-index="3"><draw:image xlink:href="Pictures/10000001000005C80000049AAB2169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283in" svg:y="0.1799in" svg:width="3.9457in" svg:height="3.0701in" draw:z-index="4"><draw:image xlink:href="Pictures/10000001000005B00000046DE94FD2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11:10:29.835170650</meta:creation-date>
    <meta:generator>LibreOffice/26.2.4.2$Linux_X86_64 LibreOffice_project/620$Build-2</meta:generator>
    <dc:date>2026-06-29T11:20:34.673716943</dc:date>
    <meta:editing-duration>PT9M43S</meta:editing-duration>
    <meta:editing-cycles>4</meta:editing-cycles>
    <meta:document-statistic meta:table-count="0" meta:image-count="5" meta:object-count="0" meta:page-count="2" meta:paragraph-count="4" meta:word-count="40" meta:character-count="236" meta:non-whitespace-character-count="198"/>
  </office:meta>
</office:document-meta>
</file>